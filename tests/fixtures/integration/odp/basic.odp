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75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993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741cm" fo:margin-bottom="0.617cm" fo:text-indent="-0.6cm"/>
    </style:style>
    <style:style style:name="P6" style:family="paragraph">
      <style:paragraph-properties fo:margin-top="0.741cm" fo:margin-bottom="0.617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7.7000007629395pt" style:font-size-asian="17.7000007629395pt" style:font-size-complex="17.700000762939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ODP Parser Fixture</text:p>
          </draw:text-box>
        </draw:frame>
        <draw:frame draw:style-name="gr1" draw:text-style-name="P1" draw:layer="layout" svg:width="24cm" svg:height="10.5cm" svg:x="2.5cm" svg:y="4cm">
          <draw:text-box>
            <text:p>Plain paragraph</text:p>
            <text:p/>
            <text:p><text:span text:style-name="T1">Bold text</text:span></text:p>
            <text:p/>
            <text:p><text:span text:style-name="T2">Italic text</text:span></text:p>
            <text:p/>
            <text:p><text:span text:style-name="T3">Underlined text</text:span></text:p>
            <text:p><text:span text:style-name="T3"/></text:p>
            <text:p><text:span text:style-name="T4">Bold and italic tex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ists</text:p>
          </draw:text-box>
        </draw:frame>
        <draw:frame draw:style-name="gr3" draw:text-style-name="P1" draw:layer="layout" svg:width="23.5cm" svg:height="12cm" svg:x="1cm" svg:y="3cm">
          <draw:text-box>
            <text:list text:style-name="L1">
              <text:list-item>
                <text:p>First bullet</text:p>
              </text:list-item>
              <text:list-item>
                <text:p>Second bullet</text:p>
                <text:list>
                  <text:list-item>
                    <text:p>Nested bullet</text:p>
                  </text:list-item>
                </text:list>
              </text:list-item>
              <text:list-item>
                <text:p><text:a xlink:href="https://github.com/nilskruthoff/pptx-parser" xlink:type="simple">Link bullet</text:a></text:p>
              </text:list-item>
            </text:list>
            <text:p/>
            <text:list text:style-name="L2">
              <text:list-item>
                <text:p><text:s/>First number</text:p>
              </text:list-item>
              <text:list-item>
                <text:p><text:s/>Second number</text:p>
                <text:list>
                  <text:list-item>
                    <text:p>Neste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ables</text:p>
          </draw:text-box>
        </draw:frame>
        <draw:frame draw:style-name="gr4" draw:layer="layout" svg:width="25.198cm" svg:height="2.885cm" svg:x="1.4cm" svg:y="3.685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Heading A</text:span></text:p>
              </table:table-cell>
              <table:table-cell>
                <text:p text:style-name="P3"><text:span text:style-name="T1">Heading B</text:span></text:p>
              </table:table-cell>
              <table:table-cell>
                <text:p text:style-name="P3"><text:span text:style-name="T1">Heading C</text:span></text:p>
              </table:table-cell>
            </table:table-row>
            <table:table-row table:style-name="ro1" table:default-cell-style-name="bg-none">
              <table:table-cell>
                <text:p>A1</text:p>
              </table:table-cell>
              <table:table-cell>
                <text:p>B1</text:p>
              </table:table-cell>
              <table:table-cell>
                <text:p>C1</text:p>
              </table:table-cell>
            </table:table-row>
            <table:table-row table:style-name="ro1" table:default-cell-style-name="bg-none">
              <table:table-cell>
                <text:p>A2</text:p>
              </table:table-cell>
              <table:table-cell>
                <text:p>B2</text:p>
              </table:table-cell>
              <table:table-cell>
                <text:p><text:a xlink:href="https://github.com/nilskruthoff/pptx-parser" xlink:type="simple">C2</text:a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rouped elements</text:p>
          </draw:text-box>
        </draw:frame>
        <draw:g draw:style-name="gr5">
          <draw:frame draw:style-name="gr6" draw:text-style-name="P1" draw:layer="layout" svg:width="11.5cm" svg:height="9cm" svg:x="2.5cm" svg:y="6cm">
            <draw:text-box>
              <text:p>Grouped Body</text:p>
            </draw:text-box>
          </draw:frame>
          <draw:frame draw:style-name="gr7" draw:text-style-name="P4" draw:layer="layout" svg:width="10.5cm" svg:height="2.243cm" svg:x="2cm" svg:y="3.257cm">
            <draw:text-box>
              <text:p><text:span text:style-name="T5">Grouped Heading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orting and empty content</text:p>
          </draw:text-box>
        </draw:frame>
        <draw:frame presentation:style-name="pr3" draw:layer="layout" svg:width="25.199cm" svg:height="1.815cm" svg:x="1.4cm" svg:y="3.685cm" presentation:class="outline" presentation:user-transformed="true">
          <draw:text-box>
            <text:p>First</text:p>
          </draw:text-box>
        </draw:frame>
        <draw:frame presentation:style-name="pr3" draw:layer="layout" svg:width="25.199cm" svg:height="1.815cm" svg:x="1.189cm" svg:y="7.185cm" presentation:class="outline" presentation:user-transformed="true">
          <draw:text-box>
            <text:p>Second</text:p>
          </draw:text-box>
        </draw:frame>
        <draw:frame presentation:style-name="pr3" draw:layer="layout" svg:width="25.199cm" svg:height="1.815cm" svg:x="1cm" svg:y="13cm" presentation:class="outline" presentation:user-transformed="true">
          <draw:text-box>
            <text:p>Third</text:p>
          </draw:text-box>
        </draw:frame>
        <draw:frame presentation:style-name="pr3" draw:layer="layout" svg:width="25.199cm" svg:height="1.815cm" svg:x="1cm" svg:y="8.685cm" presentation:class="outline" presentation:user-transformed="true">
          <draw:text-box>
            <text:p/>
          </draw:text-box>
        </draw:frame>
        <draw:frame presentation:style-name="pr3" draw:layer="layout" svg:width="25.199cm" svg:height="1.815cm" svg:x="1cm" svg:y="11cm" presentation:class="outline" presentation:user-transformed="true">
          <draw:text-box>
            <text:p/>
          </draw:text-box>
        </draw:frame>
        <draw:frame draw:style-name="gr4" draw:layer="layout" svg:width="14.098cm" svg:height="1.923cm" svg:x="1.054cm" svg:y="10.66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>
                <text:p>Left</text:p>
              </table:table-cell>
              <table:table-cell/>
              <table:table-cell>
                <text:p>Right</text:p>
              </table:table-cell>
            </table:table-row>
            <table:table-row table:style-name="ro1" table:default-cell-style-name="bg-none">
              <table:table-cell/>
              <table:table-cell>
                <text:p>Middle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5"><text:span text:style-name="T6">Speaker notes</text:span></text:p>
              <text:p text:style-name="P5"><text:span text:style-name="T6"/></text:p>
            </draw:text-box>
          </draw:frame>
        </presentation:notes>
        <officeooo:annotation svg:x="0cm" svg:y="0cm" svg:width="0.396cm" svg:height="0.496cm">
          <dc:date>2026-07-13T00:44:12</dc:date>
          <text:p text:style-name="P6"><text:span text:style-name="T6">Comment</text:span></text:p>
          <text:p text:style-name="P6"><text:span text:style-name="T6"/>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12T21:10:22.756411800</meta:creation-date>
    <dc:date>2026-07-13T01:51:58.815448600</dc:date>
    <meta:editing-duration>PT15M44S</meta:editing-duration>
    <meta:editing-cycles>6</meta:editing-cycles>
    <meta:generator>LibreOffice/25.8.7.3$Windows_X86_64 LibreOffice_project/30742500f2d3eb4366ac312fa33d3dcabdb3eba5</meta:generator>
    <meta:document-statistic meta:object-count="50"/>
  </office:meta>
</office:document-meta>
</file>